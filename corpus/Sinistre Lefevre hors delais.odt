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LEFEVRE Bernard</text:p>
      <text:p>8, rue des Acacias</text:p>
      <text:p>33000 Bordeaux</text:p>
      <text:p/>
      <text:p>Groupama, 4 cours de l'Intendance</text:p>
      <text:p>33000 Bordeaux</text:p>
      <text:p/>
      <text:p>Fait à Bordeaux, le 15/02/2025</text:p>
      <text:p/>
      <text:p>Numéro de contrat d'assurance : BDX7193M</text:p>
      <text:p/>
      <text:p>Objet : Déclaration de dégât des eaux</text:p>
      <text:p/>
      <text:p>Madame, Monsieur,</text:p>
      <text:p/>
      <text:p>Je viens, par la présente, vous déclarer un dégât des eaux survenu à mon domicile situé au 8, rue des Acacias, 33000 Bordeaux, le 03/02/2025.</text:p>
      <text:p/>
      <text:p>J'étais absent de mon domicile au moment des faits (déplacement professionnel) et n'ai découvert la fuite qu'à mon retour. Le sinistre provient d'une canalisation encastrée dans le mur de la cuisine.</text:p>
      <text:p/>
      <text:p>Vous trouverez, ci-joint, les photographies des dégâts constatés ainsi que le rapport du plombier intervenu le 14/02/2025.</text:p>
      <text:p/>
      <text:p>Je vous remercie de prendre contact avec moi le plus rapidement possible afin de m'indiquer la procédure pour l'indemnisation de ce sinistre.</text:p>
      <text:p/>
      <text:p>Je vous prie d'agréer, Madame, Monsieur, l'expression de mes salutations distinguées.</text:p>
      <text:p/>
      <text:p>Bernard LEFEVRE</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