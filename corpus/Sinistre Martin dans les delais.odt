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p>MARTIN Sophie</text:p>
      <text:p>12, avenue des Tilleuls</text:p>
      <text:p>69003 Lyon</text:p>
      <text:p/>
      <text:p>AXA, 25 avenue Matisse</text:p>
      <text:p>69003 Lyon</text:p>
      <text:p/>
      <text:p>Fait à Lyon, le 14/01/2025</text:p>
      <text:p/>
      <text:p>Numéro de contrat d'assurance : LYN4827K</text:p>
      <text:p/>
      <text:p>Objet : Déclaration de dégât des eaux</text:p>
      <text:p/>
      <text:p>Madame, Monsieur,</text:p>
      <text:p/>
      <text:p>Je viens, par la présente, vous déclarer un dégât des eaux survenu à mon domicile situé au 12, avenue des Tilleuls, 69003 Lyon, le 09/01/2025.</text:p>
      <text:p/>
      <text:p>En effet, un joint de la machine à laver a cédé durant la nuit, provoquant une fuite qui s'est étendue jusqu'au logement du voisin du dessous. J'ai immédiatement coupé l'arrivée d'eau et pris contact avec un plombier pour une réparation d'urgence le 10/01/2025.</text:p>
      <text:p/>
      <text:p>Vous trouverez, ci-joint, les photographies des dégâts constatés ainsi que la facture d'intervention du plombier.</text:p>
      <text:p/>
      <text:p>Je vous remercie de prendre contact avec moi le plus rapidement possible afin de m'indiquer la procédure pour l'indemnisation de ce sinistre.</text:p>
      <text:p/>
      <text:p>Je vous prie d'agréer, Madame, Monsieur, l'expression de mes salutations distinguées.</text:p>
      <text:p/>
      <text:p>Sophie MARTIN</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