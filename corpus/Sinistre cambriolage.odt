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/>
      <style:text-properties fo:font-variant="normal" fo:text-transform="none" fo:color="#222222" loext:opacity="100%" style:font-name="Adwaita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/>
      <style:text-properties fo:font-variant="normal" fo:text-transform="none" fo:color="#222222" loext:opacity="100%" style:font-name="Adwaita Sans" fo:font-size="10.5pt" fo:letter-spacing="normal" fo:font-style="normal" fo:font-weight="normal" officeooo:paragraph-rsid="00182dd7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222222" loext:opacity="100%" style:font-name="Adwaita Sans" fo:font-size="10.5pt" fo:letter-spacing="normal" fo:font-style="normal" fo:font-weight="normal" officeooo:paragraph-rsid="00182dd7"/>
    </style:style>
    <style:style style:name="P4" style:family="paragraph" style:parent-style-name="Text_20_body" style:list-style-name="L1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222222" loext:opacity="100%" style:font-name="Adwaita Sans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222222" loext:opacity="100%" style:font-name="Adwaita Sans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222222" loext:opacity="100%" style:font-name="Adwaita Sans" fo:font-size="10.5pt" fo:letter-spacing="normal" fo:font-style="normal" fo:font-weight="normal" officeooo:paragraph-rsid="00182dd7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/>
      <style:text-properties style:font-name="Adwaita Sans"/>
    </style:style>
    <style:style style:name="T1" style:family="text">
      <style:text-properties fo:font-variant="normal" fo:text-transform="none" fo:color="#222222" loext:opacity="100%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PONT Roger<text:line-break/>1 rue de la Fontaine 75003 Paris<text:line-break/>01.23.45.67.78<text:line-break/>Contrat d’assurance n° JJN2039DES</text:p>
      <text:p text:style-name="P2"><text:line-break/>MAIF<text:line-break/>1 rue de la Source<text:line-break/>75002 Paris</text:p>
      <text:p text:style-name="P1"><text:line-break/>A Paris, le 22/01/2017</text:p>
      <text:p text:style-name="P1">Objet : lettre de déclaration de sinistre habitation</text:p>
      <text:p text:style-name="P1">Envoi par lettre recommandée avec accusé de réception</text:p>
      <text:p text:style-name="P1"><text:line-break/>Madame, Monsieur,</text:p>
      <text:p text:style-name="P2"><text:line-break/>J’ai souscrit, auprès de votre compagnie, un contrat d’assurance habitation. Mon contrat concerne 1 rue de la Fontaine, 75003 Paris. Mon numéro de contrat est le JJN2039DES.<text:line-break/>Je souhaite déclarer, par la présente, un cambriolage dont j’ai été victime.</text:p>
      <text:p text:style-name="P1"><text:line-break/>Voici toutes les informations concernant le sinistre :</text:p>
      <text:list text:style-name="L1">
        <text:list-item>
          <text:p text:style-name="P3"><text:s/>A mon domicile le 21/01/2017;</text:p>
        </text:list-item>
        <text:list-item>
          <text:p text:style-name="P4"><text:s/>Je m’étais absenté pour une soirée, ce dont les cambrioleurs ont profité.</text:p>
        </text:list-item>
      </text:list>
      <text:p text:style-name="P1">Voici la liste des dommages que j’ai pu constater suite au sinistre :</text:p>
      <text:list text:style-name="L2">
        <text:list-item>
          <text:p text:style-name="P5"><text:s/>Le verrou de la porte a été forcé;</text:p>
        </text:list-item>
        <text:list-item>
          <text:p text:style-name="P6"><text:s/>Certains appareils électroniques ont été volés (ordinateurs et téléviseur);.</text:p>
        </text:list-item>
      </text:list>
      <text:p text:style-name="P1">Vous trouverez en pièce jointe les éléments et justificatifs suivants : (Factures, preuves d’achat, photos datées, copie de dépôt de plainte en cas de cambriolage, etc.)</text:p>
      <text:p text:style-name="P1">Je vous remercie d’enclencher la procédure d’indemnisation dans les meilleurs délais.</text:p>
      <text:p text:style-name="P1">Dans l’attente de votre réponse, je me tiens à votre disposition et vous prie d’agréer, Madame, Monsieur, l’expression de mes sentiments distingués.</text:p>
      <text:p text:style-name="P7"><text:span text:style-name="T1"><text:line-break/>DUPONT Rog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2T17:35:53.512678923</meta:creation-date>
    <dc:date>2026-06-22T17:42:45.533548755</dc:date>
    <meta:editing-duration>PT6M52S</meta:editing-duration>
    <meta:editing-cycles>1</meta:editing-cycles>
    <meta:document-statistic meta:table-count="0" meta:image-count="0" meta:object-count="0" meta:page-count="1" meta:paragraph-count="17" meta:word-count="203" meta:character-count="1286" meta:non-whitespace-character-count="1094"/>
    <meta:generator>LibreOffice/26.2.4.2$Linux_X86_64 LibreOffice_project/620$Build-2</meta:generator>
  </office:meta>
</office:document-meta>
</file>