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JP" svg:font-family="'Noto Serif CJK JP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Text_20_body">
      <style:paragraph-properties fo:margin-left="0cm" fo:margin-right="0cm" fo:text-indent="0cm" style:auto-text-indent="false"/>
      <style:text-properties officeooo:paragraph-rsid="001ccc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Emphasis">DUPONT Roger</text:span><text:line-break/>1, rue <text:span text:style-name="Emphasis">Adresse</text:span><text:line-break/>75001 Paris</text:p>
      <text:p text:style-name="P2"><text:span text:style-name="Emphasis">Matmut, 1 rue de la Matmut<text:line-break/>75001 Paris</text:span></text:p>
      <text:p text:style-name="P1"><text:span text:style-name="Emphasis">Fait à Paris, le 19/09/2021</text:span></text:p>
      <text:p text:style-name="P1"><text:span text:style-name="Emphasis">Numéro de contrat d’assurance : JJD9E321</text:span><text:line-break/><text:span text:style-name="Emphasis">Objet : Déclaration de dégât des eaux</text:span></text:p>
      <text:p text:style-name="P1"><text:span text:style-name="Emphasis">Madame, Monsieur,</text:span></text:p>
      <text:p text:style-name="P2"><text:span text:style-name="Emphasis">Je viens, par la présente, vous déclarer un dégât des eaux à mon domicile situé au 1, rue Adresse<text:line-break/>75001 Paris, survenu le 19/09/2021.</text:span></text:p>
      <text:p text:style-name="P1"><text:span text:style-name="Emphasis">En effet, un tube de cuivre s’est ouvert, ce qui a occasioné un écoulement pendant plusieurs heures, et potentiellement des dégats chez le voisin du dessous. La réparation pourrait couté plusieurs centaines d’euros.</text:span></text:p>
      <text:p text:style-name="P1"><text:span text:style-name="Emphasis">Vous trouverez, ci-joint, l’ensemble des justificatifs liés à ce sinistre (photographies des biens endommagés et photocopies des factures d’achat).</text:span></text:p>
      <text:p text:style-name="P1"><text:span text:style-name="Emphasis">Je vous remercie de prendre contact avec moi le plus rapidement possible afin de m’indiquer la procédure pour l’indemnisation de ce sinistre.</text:span></text:p>
      <text:p text:style-name="P1"><text:span text:style-name="Emphasis">Je vous prie d’agréer, Madame, Monsieur, l’expression de mes salutations distinguées.</text:span></text:p>
      <text:p text:style-name="P1"><text:span text:style-name="Emphasis">Roger DUPONT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JP" svg:font-family="'Noto Serif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JP" style:font-size-asian="10.5pt" style:language-asian="ja" style:country-asian="JP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JP" style:font-size-asian="10.5pt" style:language-asian="ja" style:country-asian="JP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JP" style:font-family-asian="'Noto Sans CJK JP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22T17:17:57.516841853</meta:creation-date>
    <dc:date>2026-06-22T17:23:24.917182819</dc:date>
    <meta:editing-duration>PT5M27S</meta:editing-duration>
    <meta:editing-cycles>1</meta:editing-cycles>
    <meta:generator>LibreOffice/26.2.4.2$Linux_X86_64 LibreOffice_project/620$Build-2</meta:generator>
    <meta:document-statistic meta:table-count="0" meta:image-count="0" meta:object-count="0" meta:page-count="1" meta:paragraph-count="11" meta:word-count="146" meta:character-count="932" meta:non-whitespace-character-count="797"/>
  </office:meta>
</office:document-meta>
</file>